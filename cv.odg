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A6000004C68309F0C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Black" svg:font-family="'Montserrat Black'" style:font-pitch="variable"/>
    <style:font-face style:name="Montserrat Black1" svg:font-family="'Montserrat Black'" style:font-adornments="Regular" style:font-pitch="variable"/>
    <style:font-face style:name="Montserrat Medium" svg:font-family="'Montserrat Medium'" style:font-pitch="variable"/>
    <style:font-face style:name="Montserrat Thin" svg:font-family="'Montserrat Thin'" style:font-adornments="SemiBold" style:font-pitch="variable"/>
    <style:font-face style:name="Montserrat Thin1" svg:font-family="'Montserrat Thin'" style:font-adornments="Medium" style:font-pitch="variable"/>
    <style:font-face style:name="Montserrat Thin2" svg:font-family="'Montserrat Thi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3430c" draw:fill="solid" draw:fill-color="#303030" draw:textarea-horizontal-align="left" draw:textarea-vertical-align="middle" draw:auto-grow-height="false" fo:min-height="29.436cm" fo:min-width="7.712cm" loext:glow-color="#ffffff" loext:glow-transparency="0%" loext:softedge-radius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747cm" fo:min-width="5.505cm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062cm" fo:min-width="3.744cm" loext:glow-color="#c7a80c" loext:glow-transparency="0%" loext:softedge-radius="0cm" loext:decorative="false"/>
    </style:style>
    <style:style style:name="gr4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3.747cm" fo:min-width="5.01cm" loext:glow-color="#c7a80c" loext:glow-transparency="0%" loext:softedge-radius="0cm" loext:decorative="false"/>
    </style:style>
    <style:style style:name="gr5" style:family="graphic" style:parent-style-name="standard">
      <style:graphic-properties svg:stroke-width="0.106cm" svg:stroke-color="#f2ab21" draw:marker-start-width="0.358cm" draw:marker-end-width="0.358cm" draw:fill="bitmap" draw:fill-color="#f2ab21" draw:fill-image-name="photoy" style:repeat="stretch" draw:textarea-horizontal-align="justify" draw:textarea-vertical-align="middle" draw:auto-grow-height="false" fo:min-height="3.534cm" fo:min-width="3.212cm" fo:padding-top="0.177cm" fo:padding-bottom="0.177cm" fo:padding-left="0.302cm" fo:padding-right="0.302cm" loext:glow-color="#ffffff" loext:glow-transparency="0%" loext:softedge-radius="0cm" loext:decorative="false"/>
    </style:style>
    <style:style style:name="gr6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29.462cm" fo:min-width="0cm" loext:decorative="false"/>
    </style:style>
    <style:style style:name="gr7" style:family="graphic" style:parent-style-name="standard" style:list-style-name="L1">
      <style:graphic-properties svg:stroke-color="#729fcf" svg:stroke-opacity="10%" draw:opacity="10%" draw:textarea-horizontal-align="left" draw:textarea-vertical-align="middle" draw:auto-grow-height="false" fo:min-height="2.552cm" fo:min-width="9.586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2ab21" draw:fill="solid" draw:fill-color="#f2ab21" draw:opacity="50%" draw:textarea-horizontal-align="justify" draw:textarea-vertical-align="middle" draw:auto-grow-height="false" fo:min-height="28.226cm" fo:min-width="0cm" loext:decorative="false"/>
    </style:style>
    <style:style style:name="gr9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29.411cm" fo:min-width="0cm" loext:decorative="false"/>
    </style:style>
    <style:style style:name="gr10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45cm" fo:min-width="0.147cm" fo:wrap-option="wrap" draw:shadow="hidden" draw:shadow-offset-x="0cm" draw:shadow-offset-y="0cm" loext:decorative="false"/>
    </style:style>
    <style:style style:name="gr11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738cm" fo:min-width="5.038cm" draw:shadow="hidden" draw:shadow-offset-x="0cm" draw:shadow-offset-y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765cm" fo:min-width="5.621cm" draw:shadow="hidden" draw:shadow-offset-x="0cm" draw:shadow-offset-y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738cm" fo:min-width="5.709cm" draw:shadow="hidden" draw:shadow-offset-x="0cm" draw:shadow-offset-y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45cm" fo:min-width="0.13cm" fo:wrap-option="wrap" draw:shadow="hidden" draw:shadow-offset-x="0cm" draw:shadow-offset-y="0cm" loext:decorative="false"/>
    </style:style>
    <style:style style:name="gr15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469cm" fo:min-width="0.109cm" fo:wrap-option="wrap" draw:shadow="hidden" draw:shadow-offset-x="0cm" draw:shadow-offset-y="0cm" loext:decorative="false"/>
    </style:style>
    <style:style style:name="gr16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632cm" fo:min-width="4.898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668cm" fo:min-width="4.998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668cm" fo:min-width="4.192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4cm" fo:min-width="0.061cm" fo:wrap-option="wrap" loext:decorative="false"/>
    </style:style>
    <style:style style:name="gr20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4cm" fo:min-width="0.075cm" fo:wrap-option="wrap" loext:decorative="false"/>
    </style:style>
    <style:style style:name="gr21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374cm" fo:min-width="0.151cm" fo:wrap-option="wrap" loext:decorative="false"/>
    </style:style>
    <style:style style:name="gr22" style:family="graphic" style:parent-style-name="standard">
      <style:graphic-properties svg:stroke-color="#729fcf" svg:stroke-opacity="10%" draw:fill="solid" draw:fill-color="#ffffff" draw:opacity="10%" draw:textarea-horizontal-align="justify" draw:textarea-vertical-align="middle" draw:auto-grow-height="false" fo:min-height="2.744cm" fo:min-width="10.678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c88d1c" draw:fill="solid" draw:fill-color="#c88d1c" draw:textarea-horizontal-align="justify" draw:textarea-vertical-align="middle" draw:auto-grow-height="false" fo:min-height="0.034cm" fo:min-width="0cm" fo:wrap-option="wrap" loext:decorative="false"/>
    </style:style>
    <style:style style:name="gr24" style:family="graphic" style:parent-style-name="standard">
      <style:graphic-properties svg:stroke-color="#c88d1c" draw:fill="solid" draw:fill-color="#c88d1c" draw:textarea-horizontal-align="justify" draw:textarea-vertical-align="middle" draw:auto-grow-height="false" fo:min-height="0.034cm" fo:min-width="0cm" fo:wrap-option="wrap" loext:decorative="false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506cm" loext:decorative="false"/>
      <style:paragraph-properties style:writing-mode="lr-tb"/>
    </style:style>
    <style:style style:name="P1" style:family="paragraph">
      <loext:graphic-properties draw:fill="solid" draw:fill-color="#303030"/>
      <style:paragraph-properties fo:text-align="right" style:writing-mode="lr-tb"/>
      <style:text-properties style:font-name="Montserrat Thin1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2ab21"/>
      <style:paragraph-properties fo:text-align="center"/>
    </style:style>
    <style:style style:name="P4" style:family="paragraph">
      <loext:graphic-properties draw:fill="bitmap" draw:fill-color="#f2ab21" draw:fill-image-name="photoy" style:repeat="stretch"/>
      <style:paragraph-properties fo:text-align="center"/>
    </style:style>
    <style:style style:name="P5" style:family="paragraph">
      <loext:graphic-properties draw:fill="solid" draw:fill-color="#03430c"/>
      <style:paragraph-properties fo:text-align="center"/>
    </style:style>
    <style:style style:name="P6" style:family="paragraph">
      <style:paragraph-properties fo:margin-left="0cm" fo:margin-right="0cm" fo:margin-top="0.3cm" fo:margin-bottom="0.3cm" fo:line-height="100%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Georgi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opacity="10%"/>
      <style:paragraph-properties fo:margin-left="0cm" fo:margin-right="0cm" fo:margin-top="0.3cm" fo:margin-bottom="0.3cm" fo:line-height="100%" fo:text-align="lef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Georgi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2ab21" draw:opacity="50%"/>
      <style:paragraph-properties fo:text-align="center"/>
    </style:style>
    <style:style style:name="P9" style:family="paragraph">
      <style:paragraph-properties fo:text-align="center"/>
      <style:text-properties style:font-name="Montserrat Black" fo:font-weight="bold" style:font-weight-asian="bold" style:font-weight-complex="bold"/>
    </style:style>
    <style:style style:name="P10" style:family="paragraph">
      <loext:graphic-properties draw:fill="solid" draw:fill-color="#03430c"/>
      <style:paragraph-properties fo:text-align="center" style:writing-mode="lr-tb"/>
      <style:text-properties style:font-name="Montserrat Black" fo:font-weight="bold" style:font-weight-asian="bold" style:font-weight-complex="bold"/>
    </style:style>
    <style:style style:name="P11" style:family="paragraph">
      <style:paragraph-properties fo:text-align="center"/>
      <style:text-properties style:font-name="Montserrat Black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solid" draw:fill-color="#03430c"/>
      <style:paragraph-properties fo:text-align="center" style:writing-mode="lr-tb"/>
      <style:text-properties style:font-name="Montserrat Black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color="#ffffff" loext:opacity="100%" style:font-name="Montserrat Black" fo:font-weight="bold" style:font-weight-asian="bold" style:font-weight-complex="bold"/>
    </style:style>
    <style:style style:name="P14" style:family="paragraph">
      <loext:graphic-properties draw:fill="solid" draw:fill-color="#f2ab21"/>
      <style:paragraph-properties fo:text-align="center" style:writing-mode="lr-tb"/>
      <style:text-properties fo:color="#ffffff" loext:opacity="100%" style:font-name="Montserrat Black" fo:font-weight="bold" style:font-weight-asian="bold" style:font-weight-complex="bold"/>
    </style:style>
    <style:style style:name="P15" style:family="paragraph">
      <style:paragraph-properties fo:text-align="center"/>
      <style:text-properties fo:color="#ffffff" loext:opacity="100%" style:font-name="Montserrat Black" fo:font-weight="normal" style:font-weight-asian="normal" style:font-weight-complex="normal"/>
    </style:style>
    <style:style style:name="P16" style:family="paragraph">
      <loext:graphic-properties draw:fill="solid" draw:fill-color="#f2ab21"/>
      <style:paragraph-properties fo:text-align="center" style:writing-mode="lr-tb"/>
      <style:text-properties fo:color="#ffffff" loext:opacity="100%" style:font-name="Montserrat Black" fo:font-weight="normal" style:font-weight-asian="normal" style:font-weight-complex="normal"/>
    </style:style>
    <style:style style:name="P17" style:family="paragraph">
      <style:paragraph-properties fo:margin-top="0.42cm" fo:margin-bottom="0.35cm" fo:line-height="150%" fo:text-align="justify"/>
      <style:text-properties style:font-name="Montserrat Thin1" fo:font-size="12pt" style:font-size-asian="12pt" style:font-size-complex="12pt"/>
    </style:style>
    <style:style style:name="P18" style:family="paragraph">
      <loext:graphic-properties draw:fill="solid" draw:fill-color="#ffffff" draw:opacity="10%"/>
      <style:paragraph-properties fo:margin-top="0.42cm" fo:margin-bottom="0.35cm" fo:line-height="150%" fo:text-align="justify" style:writing-mode="lr-tb"/>
      <style:text-properties style:font-name="Montserrat Thin1" fo:font-size="12pt" style:font-size-asian="12pt" style:font-size-complex="12pt"/>
    </style:style>
    <style:style style:name="P19" style:family="paragraph">
      <loext:graphic-properties draw:fill="solid" draw:fill-color="#c88d1c"/>
      <style:paragraph-properties fo:text-align="center"/>
    </style:style>
    <style:style style:name="P20" style:family="paragraph">
      <style:paragraph-properties fo:margin-left="0cm" fo:margin-right="0cm" fo:margin-top="0.32cm" fo:margin-bottom="0.25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2cm" fo:margin-bottom="0.2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font-name="Montserrat Thin2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.22cm" fo:margin-bottom="0.2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font-name="Montserrat Thin2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22cm" fo:margin-bottom="0.2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.32cm" fo:margin-bottom="0.25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3430c" loext:opacity="100%" style:text-outline="false" style:text-line-through-style="none" style:text-line-through-type="none" style:font-name="Montserrat Black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88d1c" loext:opacity="100%" style:font-name="Montserrat Black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3430c" loext:opacity="100%" style:font-name="Montserrat Medium" fo:font-size="13pt" fo:font-style="italic" style:font-size-asian="13pt" style:font-style-asian="italic" style:font-size-complex="13pt" style:font-style-complex="italic"/>
    </style:style>
    <style:style style:name="T4" style:family="text">
      <style:text-properties fo:color="#c7870c" loext:opacity="100%" style:font-name="Montserrat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Montserrat Black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Montserrat Black" fo:font-size="20pt" fo:font-weight="bold" style:font-name-asian="Georgia1" style:font-size-asian="20pt" style:font-weight-asian="bold" style:font-name-complex="Georgia1" style:font-size-complex="20pt" style:font-weight-complex="bold"/>
    </style:style>
    <style:style style:name="T7" style:family="text">
      <style:text-properties fo:color="#ffffff" loext:opacity="100%" style:font-name="Montserrat Black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loext:opacity="100%" style:font-name="Montserrat Black" fo:font-size="20pt" fo:font-weight="bold" style:font-name-asian="Georgia1" style:font-size-asian="20pt" style:font-weight-asian="bold" style:font-name-complex="Georgia1" style:font-size-complex="20pt" style:font-weight-complex="bold"/>
    </style:style>
    <style:style style:name="T9" style:family="text">
      <style:text-properties fo:color="#ffffff" loext:opacity="100%" style:font-name="Montserrat Black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Thin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Thin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Thin1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Black" fo:font-size="12pt" fo:font-style="italic" fo:text-shadow="none" style:text-underline-style="none" fo:font-weight="bold" style:letter-kerning="true" style:font-size-asian="12pt" style:font-style-asian="italic" style:font-weight-asian="bold" style:font-size-complex="12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Thin1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Thin1" fo:font-size="12pt" fo:font-style="normal" fo:text-shadow="none" style:text-underline-style="none" fo:font-weight="normal" style:letter-kerning="true" style:font-name-asian="Georgia1" style:font-size-asian="12pt" style:font-style-asian="normal" style:font-weight-asian="normal" style:font-name-complex="Georgia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Montserrat Thin1" fo:font-size="12pt" style:font-size-asian="12pt" style:font-size-complex="12pt"/>
    </style:style>
    <style:style style:name="T17" style:family="text">
      <style:text-properties fo:color="#ffffff" loext:opacity="100%" style:font-name="Montserrat Thin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ffffff" loext:opacity="100%" style:font-name="Montserrat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ffffff" loext:opacity="100%" style:font-name="Montserrat Thin2" fo:font-size="16pt" fo:font-style="normal" fo:font-weight="bold" style:font-name-asian="Montserrat Thin2" style:font-size-asian="16pt" style:font-style-asian="normal" style:font-weight-asian="bold" style:font-name-complex="Montserrat Thin2" style:font-size-complex="16pt" style:font-style-complex="normal" style:font-weight-complex="bold"/>
    </style:style>
    <style:style style:name="T20" style:family="text">
      <style:text-properties fo:color="#ffffff" loext:opacity="100%" style:font-name="Montserrat Black" fo:font-size="12pt" fo:font-style="normal" fo:font-weight="bold" style:font-name-asian="Montserrat Thin2" style:font-size-asian="12pt" style:font-style-asian="normal" style:font-weight-asian="bold" style:font-name-complex="Montserrat Thin2" style:font-size-complex="12pt" style:font-style-complex="normal" style:font-weight-complex="bold"/>
    </style:style>
    <style:style style:name="T21" style:family="text">
      <style:text-properties fo:color="#ffffff" loext:opacity="100%" style:font-name="Montserrat Black1" fo:font-size="12pt" fo:font-style="normal" fo:font-weight="bold" style:font-name-asian="Montserrat Thin2" style:font-size-asian="12pt" style:font-style-asian="normal" style:font-weight-asian="bold" style:font-name-complex="Montserrat Thin2" style:font-size-complex="12pt" style:font-style-complex="normal" style:font-weight-complex="bold"/>
    </style:style>
    <style:style style:name="T22" style:family="text">
      <style:text-properties fo:color="#ffffff" loext:opacity="100%" style:font-name="Montserrat Black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ffffff" loext:opacity="100%" style:font-name="Montserrat Black" fo:font-size="12pt" fo:font-style="normal" fo:font-weight="normal" style:font-name-asian="Montserrat Thin2" style:font-size-asian="12pt" style:font-style-asian="normal" style:font-weight-asian="normal" style:font-name-complex="Montserrat Thin2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12cm" svg:height="29.686cm" svg:x="0cm" svg:y="0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05cm" svg:height="3.997cm" svg:x="1.094cm" svg:y="-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6.096cm" svg:x="1.1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1cm" svg:height="3.997cm" svg:x="1.34cm" svg:y="-0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96cm" svg:height="5.496cm" svg:x="1.403cm" svg:y="1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9cm" svg:height="29.712cm" svg:x="20.721cm" svg:y="-0.0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388cm" svg:height="3.104cm" svg:x="9.464cm" svg:y="1.008cm">
          <text:p text:style-name="P6"><text:span text:style-name="T1">ABDUL DANIEL </text:span><text:span text:style-name="T2">TRATO</text:span></text:p>
          <text:p text:style-name="P6"><text:span text:style-name="T3">Gestor de Logística</text:span></text:p>
          <text:p text:style-name="P6"><text:span text:style-name="T4">Oficial Sêni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8" draw:layer="layout" svg:width="0.176cm" svg:height="28.492cm" svg:x="8.716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3" draw:layer="layout" svg:width="0.306cm" svg:height="29.689cm" svg:x="8.102cm" svg:y="-0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5" draw:layer="layout" svg:width="0.913cm" svg:height="0.988cm" svg:x="13.695cm" svg:y="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5.538cm" svg:height="0.988cm" svg:x="8.681cm" svg:y="4.418cm">
          <text:p text:style-name="P9"><text:span text:style-name="T5">Sobre Mim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21cm" svg:height="1.015cm" svg:x="8.708cm" svg:y="10.318cm">
          <text:p text:style-name="P11"><text:span text:style-name="T5">Experi</text:span><text:span text:style-name="T6">ê</text:span><text:span text:style-name="T5">nc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209cm" svg:height="0.988cm" svg:x="8.686cm" svg:y="18.929cm">
          <text:p text:style-name="P9"><text:span text:style-name="T5">Habilidade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89cm" svg:height="0.988cm" svg:x="14.5cm" svg:y="1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859cm" svg:height="1.015cm" svg:x="14.454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5.398cm" svg:height="0.882cm" svg:x="0.002cm" svg:y="21.822cm">
          <text:p text:style-name="P13"><text:span text:style-name="T7">Educação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498cm" svg:height="0.918cm" svg:x="0.002cm" svg:y="13.696cm">
          <text:p text:style-name="P13"><text:span text:style-name="T7">Refer</text:span><text:span text:style-name="T8">ê</text:span><text:span text:style-name="T7">ncia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692cm" svg:height="0.918cm" svg:x="0.002cm" svg:y="7.816cm">
          <text:p text:style-name="P15"><text:span text:style-name="T9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0.791cm" svg:height="0.918cm" svg:x="4.314cm" svg:y="7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11cm" svg:height="0.918cm" svg:x="5.106cm" svg:y="13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919cm" svg:height="0.882cm" svg:x="4.882cm" svg:y="2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11.5cm" svg:height="3.316cm" svg:x="9.01cm" svg:y="6.018cm">
          <text:p text:style-name="P17"><text:span text:style-name="T10">Sou um profissional</text:span><text:span text:style-name="T11"> formado em </text:span><text:span text:style-name="T12">CV-5 em</text:span><text:span text:style-name="T11"> </text:span><text:span text:style-name="T13">Gestão da Logística</text:span><text:span text:style-name="T11"> pelo </text:span><text:span text:style-name="T14">Instituto Industrial e Comercial de <text:s/>Pemba</text:span><text:span text:style-name="T11">, com uma sólida base prática e experi</text:span><text:span text:style-name="T15">ê</text:span><text:span text:style-name="T10">ncia adquirida durante <text:s/>9 anos como Técnico de Laboratório <text:s text:c="2"/>e 5 anos como Gestor de Logística</text:span><text:span text:style-name="T1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9" draw:layer="layout" svg:width="0.402cm" svg:height="0.402cm" svg:x="8.60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402cm" svg:height="0.402cm" svg:x="8.606cm" svg:y="1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0.402cm" svg:height="0.402cm" svg:x="8.606cm" svg:y="6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402cm" svg:height="0.402cm" svg:x="8.606cm" svg:y="1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402cm" svg:height="0.402cm" svg:x="8.606cm" svg:y="2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4" draw:layer="layout" svg:width="8.716cm" svg:height="4.897cm" svg:x="0cm" svg:y="8.67cm">
          <draw:text-box>
            <text:p text:style-name="P20"><text:span text:style-name="T17"><text:s/>✆ </text:span><text:span text:style-name="T18">+258-84-777-8476</text:span></text:p>
            <text:p text:style-name="P21"><text:span text:style-name="T19"><text:s/>✉ </text:span><text:span text:style-name="T20">abdultrato@gmail.com</text:span></text:p>
            <text:p text:style-name="P22"><text:span text:style-name="T19">🔗 </text:span><text:span text:style-name="T21"><text:a xlink:href="https://www.linkedin.com/" xlink:type="simple">https://www.linkedin.com/</text:a></text:span><text:span text:style-name="T21">abdul</text:span><text:span text:style-name="T22">-daniel-trato</text:span></text:p>
            <text:p text:style-name="P23"><text:span text:style-name="T19"><text:s/>🏠 </text:span><text:span text:style-name="T23">Cidade de Pemba, Cabo <text:s text:c="17"/>Delgad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Black" svg:font-family="'Montserrat Black'" style:font-pitch="variable"/>
    <style:font-face style:name="Montserrat Black1" svg:font-family="'Montserrat Black'" style:font-adornments="Regular" style:font-pitch="variable"/>
    <style:font-face style:name="Montserrat Medium" svg:font-family="'Montserrat Medium'" style:font-pitch="variable"/>
    <style:font-face style:name="Montserrat Thin" svg:font-family="'Montserrat Thin'" style:font-adornments="SemiBold" style:font-pitch="variable"/>
    <style:font-face style:name="Montserrat Thin1" svg:font-family="'Montserrat Thin'" style:font-adornments="Medium" style:font-pitch="variable"/>
    <style:font-face style:name="Montserrat Thin2" svg:font-family="'Montserrat Thi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hotoy" xlink:href="Pictures/10000001000004A6000004C68309F0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cm" fo:margin-bottom="0cm" fo:margin-left="0.484cm" fo:margin-right="0.2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09:54:11.911964200</meta:creation-date>
    <dc:date>2026-05-22T17:02:15.734924664</dc:date>
    <meta:editing-duration>PT4H29M22S</meta:editing-duration>
    <meta:editing-cycles>45</meta:editing-cycles>
    <meta:generator>LibreOffice/26.2.2.2$Linux_X86_64 LibreOffice_project/620$Build-2</meta:generator>
    <meta:document-statistic meta:object-count="28"/>
  </office:meta>
</office:document-meta>
</file>