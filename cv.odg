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4A6000004C68309F0C4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iberationSerif-Bold" svg:font-family="LiberationSerif-Bold"/>
    <style:font-face style:name="LiberationSerif-BoldItalic" svg:font-family="LiberationSerif-BoldItalic"/>
    <style:font-face style:name="Microsoft YaHei" svg:font-family="'Microsoft YaHei'" style:font-family-generic="system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Black2" svg:font-family="'Montserrat Black'"/>
    <style:font-face style:name="Montserrat Light" svg:font-family="'Montserrat Light'" style:font-pitch="variable"/>
    <style:font-face style:name="Montserrat Medium" svg:font-family="'Montserrat Medium'" style:font-adornments="Regular" style:font-pitch="variable"/>
    <style:font-face style:name="Montserrat Medium1" svg:font-family="'Montserrat Medium'"/>
    <style:font-face style:name="Montserrat Thin" svg:font-family="'Montserrat Thin'" style:font-pitch="variable"/>
    <style:font-face style:name="Montserrat Thin1" svg:font-family="'Montserrat Thin'" style:font-adornments="Mediu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03030" draw:marker-start-width="0.252cm" draw:marker-end-width="0.252cm" draw:fill="solid" draw:fill-color="#303030" draw:textarea-horizontal-align="left" draw:textarea-vertical-align="middle" draw:auto-grow-height="false" fo:min-height="29.436cm" fo:min-width="7.712cm" fo:padding-top="0.142cm" fo:padding-bottom="0.142cm" fo:padding-left="0.267cm" fo:padding-right="0.267cm" loext:glow-color="#ffffff" loext:glow-transparency="0%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747cm" fo:min-width="5.505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062cm" fo:min-width="3.744cm" loext:glow-color="#c7a80c" loext:glow-transparency="0%" loext:softedge-radius="0cm" loext:decorative="false"/>
    </style:style>
    <style:style style:name="gr4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3.747cm" fo:min-width="5.01cm" loext:glow-color="#c7a80c" loext:glow-transparency="0%" loext:softedge-radius="0cm" loext:decorative="false"/>
    </style:style>
    <style:style style:name="gr5" style:family="graphic" style:parent-style-name="standard">
      <style:graphic-properties svg:stroke-width="0.106cm" svg:stroke-color="#f2ab21" draw:marker-start-width="0.358cm" draw:marker-end-width="0.358cm" draw:fill="bitmap" draw:fill-color="#f2ab21" draw:fill-image-name="photoy" style:repeat="stretch" draw:textarea-horizontal-align="justify" draw:textarea-vertical-align="middle" draw:auto-grow-height="false" fo:min-height="3.534cm" fo:min-width="3.212cm" fo:padding-top="0.177cm" fo:padding-bottom="0.177cm" fo:padding-left="0.302cm" fo:padding-right="0.302cm" loext:glow-color="#ffffff" loext:glow-transparency="0%" loext:softedge-radius="0cm" loext:decorative="false"/>
    </style:style>
    <style:style style:name="gr6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29.462cm" fo:min-width="0cm" loext:decorative="false"/>
    </style:style>
    <style:style style:name="gr7" style:family="graphic" style:parent-style-name="standard" style:list-style-name="L1">
      <style:graphic-properties svg:stroke-color="#729fcf" svg:stroke-opacity="10%" draw:opacity="10%" draw:textarea-horizontal-align="right" draw:textarea-vertical-align="middle" draw:auto-grow-height="false" fo:min-height="2.185cm" fo:min-width="9.48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f2ab21" draw:marker-start-width="0.359cm" draw:marker-end-width="0.359cm" draw:fill="solid" draw:fill-color="#f2ab21" draw:opacity="100%" draw:textarea-horizontal-align="justify" draw:textarea-vertical-align="middle" draw:auto-grow-height="false" fo:min-height="27.618cm" fo:min-width="0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246cm" fo:min-width="0cm" fo:wrap-option="wrap" draw:shadow="hidden" draw:shadow-offset-x="0cm" draw:shadow-offset-y="0cm" loext:decorative="false"/>
    </style:style>
    <style:style style:name="gr10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458cm" fo:min-width="5.085cm" draw:shadow="hidden" draw:shadow-offset-x="0cm" draw:shadow-offset-y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447cm" fo:min-width="5.695cm" draw:shadow="hidden" draw:shadow-offset-x="0cm" draw:shadow-offset-y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3430c" draw:marker-start-width="0.359cm" draw:marker-end-width="0.359cm" draw:fill="solid" draw:fill-color="#03430c" draw:textarea-horizontal-align="justify" draw:textarea-vertical-align="middle" draw:auto-grow-height="false" fo:min-height="0.341cm" fo:min-width="5.407cm" fo:padding-top="0.178cm" fo:padding-bottom="0.178cm" fo:padding-left="0.303cm" fo:padding-right="0.303cm" draw:shadow="hidden" draw:shadow-offset-x="0cm" draw:shadow-offset-y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3430c" draw:marker-start-width="0.359cm" draw:marker-end-width="0.359cm" draw:fill="solid" draw:fill-color="#03430c" draw:textarea-horizontal-align="justify" draw:textarea-vertical-align="middle" draw:auto-grow-height="false" fo:min-height="0.137cm" fo:min-width="0cm" fo:padding-top="0.178cm" fo:padding-bottom="0.178cm" fo:padding-left="0.303cm" fo:padding-right="0.303cm" fo:wrap-option="wrap" draw:shadow="hidden" draw:shadow-offset-x="0cm" draw:shadow-offset-y="0cm" loext:decorative="false"/>
    </style:style>
    <style:style style:name="gr14" style:family="graphic" style:parent-style-name="standard">
      <style:graphic-properties svg:stroke-color="#03430c" draw:fill="solid" draw:fill-color="#03430c" draw:textarea-horizontal-align="justify" draw:textarea-vertical-align="middle" draw:auto-grow-height="false" fo:min-height="0.237cm" fo:min-width="0.01cm" fo:wrap-option="wrap" draw:shadow="hidden" draw:shadow-offset-x="0cm" draw:shadow-offset-y="0cm" loext:decorative="false"/>
    </style:style>
    <style:style style:name="gr15" style:family="graphic" style:parent-style-name="standard" style:list-style-name="L1">
      <style:graphic-properties svg:stroke-width="0.035cm" svg:stroke-color="#f2ab21" draw:marker-start="Arrowheads_20_1" draw:marker-start-width="0.252cm" draw:marker-end-width="0.252cm" draw:fill="solid" draw:fill-color="#f2ab21" draw:textarea-horizontal-align="justify" draw:textarea-vertical-align="middle" draw:auto-grow-height="false" fo:min-height="0.417cm" fo:min-width="3.943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f2ab21" draw:marker-start-width="0.252cm" draw:marker-end-width="0.252cm" draw:fill="solid" draw:fill-color="#f2ab21" draw:textarea-horizontal-align="justify" draw:textarea-vertical-align="middle" draw:auto-grow-height="false" fo:min-height="0.428cm" fo:min-width="4.964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2ab21" draw:marker-start-width="0.252cm" draw:marker-end-width="0.252cm" draw:fill="solid" draw:fill-color="#f2ab21" draw:textarea-horizontal-align="justify" draw:textarea-vertical-align="middle" draw:auto-grow-height="false" fo:min-height="0.413cm" fo:min-width="4.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243cm" fo:min-width="0cm" fo:wrap-option="wrap" loext:decorative="false"/>
    </style:style>
    <style:style style:name="gr19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265cm" fo:min-width="0.05cm" fo:wrap-option="wrap" loext:decorative="false"/>
    </style:style>
    <style:style style:name="gr20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247cm" fo:min-width="0.002cm" fo:wrap-option="wrap" loext:decorative="false"/>
    </style:style>
    <style:style style:name="gr21" style:family="graphic" style:parent-style-name="standard">
      <style:graphic-properties svg:stroke-color="#f2ab21" draw:fill="solid" draw:fill-color="#f2ab21" draw:textarea-horizontal-align="justify" draw:textarea-vertical-align="middle" draw:auto-grow-height="false" fo:min-height="0.099cm" fo:min-width="0cm" fo:wrap-option="wrap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4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1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loext:fill-use-slide-background="false" draw:opacity="10%" draw:fill-image-width="100%" draw:fill-image-height="100%" style:repeat="no-repeat" draw:fill-image-ref-point="center" draw:textarea-horizontal-align="left" draw:auto-grow-height="true" draw:auto-grow-width="false" fo:min-height="4.7cm" draw:shadow-opacity="10%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f2ab21" draw:marker-start-width="0.253cm" draw:marker-end-width="0.253cm" draw:fill="solid" draw:fill-color="#f2ab21" draw:textarea-horizontal-align="justify" draw:textarea-vertical-align="middle" draw:auto-grow-height="false" fo:min-height="29.394cm" fo:min-width="0cm" fo:padding-top="0.143cm" fo:padding-bottom="0.143cm" fo:padding-left="0.268cm" fo:padding-right="0.268cm"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745cm" loext:decorative="false"/>
      <style:paragraph-properties style:writing-mode="lr-tb"/>
    </style:style>
    <style:style style:name="P1" style:family="paragraph">
      <loext:graphic-properties draw:fill="solid" draw:fill-color="#303030"/>
      <style:paragraph-properties fo:text-align="right" style:writing-mode="lr-tb"/>
      <style:text-properties style:font-name="Montserrat Thin1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2ab21"/>
      <style:paragraph-properties fo:text-align="center"/>
    </style:style>
    <style:style style:name="P4" style:family="paragraph">
      <loext:graphic-properties draw:fill="bitmap" draw:fill-color="#f2ab21" draw:fill-image-name="photoy" style:repeat="stretch"/>
      <style:paragraph-properties fo:text-align="center"/>
    </style:style>
    <style:style style:name="P5" style:family="paragraph">
      <loext:graphic-properties draw:fill="solid" draw:fill-color="#03430c"/>
      <style:paragraph-properties fo:text-align="center"/>
    </style:style>
    <style:style style:name="P6" style:family="paragraph">
      <style:paragraph-properties fo:margin-left="0cm" fo:margin-right="0cm" fo:margin-top="0.2cm" fo:margin-bottom="0.2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Georgi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1cm" fo:margin-right="0cm" fo:margin-top="0.2cm" fo:margin-bottom="0.2cm" fo:line-height="100%" fo:text-align="right" fo:text-indent="-1cm"/>
      <style:text-properties fo:font-variant="normal" fo:text-transform="none" style:use-window-font-color="true" loext:opacity="0%" style:text-outline="false" style:text-line-through-style="none" style:text-line-through-type="none" style:font-name="Georgi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opacity="10%"/>
      <style:paragraph-properties fo:margin-left="0cm" fo:margin-right="0cm" fo:margin-top="0.2cm" fo:margin-bottom="0.2cm" fo:line-height="100%" fo:text-align="lef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2ab21" draw:opacity="100%"/>
      <style:paragraph-properties fo:text-align="center"/>
    </style:style>
    <style:style style:name="P10" style:family="paragraph">
      <style:paragraph-properties fo:text-align="center"/>
      <style:text-properties style:font-name="Montserrat Black" fo:font-weight="bold" style:font-weight-asian="bold" style:font-weight-complex="bold"/>
    </style:style>
    <style:style style:name="P11" style:family="paragraph">
      <loext:graphic-properties draw:fill="solid" draw:fill-color="#03430c"/>
      <style:paragraph-properties fo:text-align="center" style:writing-mode="lr-tb"/>
      <style:text-properties style:font-name="Montserrat Black" fo:font-weight="bold" style:font-weight-asian="bold" style:font-weight-complex="bold"/>
    </style:style>
    <style:style style:name="P12" style:family="paragraph">
      <style:paragraph-properties fo:text-align="center"/>
      <style:text-properties style:font-name="Montserrat Black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03430c"/>
      <style:paragraph-properties fo:text-align="center" style:writing-mode="lr-tb"/>
      <style:text-properties style:font-name="Montserrat Black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.356cm" fo:margin-right="0.61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Montserrat Black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2ab21"/>
      <style:paragraph-properties fo:margin-left="0.356cm" fo:margin-right="0.61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Montserrat Black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.406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Montserrat Black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2ab21"/>
      <style:paragraph-properties fo:margin-left="0cm" fo:margin-right="0.406cm" fo:text-align="center" fo:text-indent="0cm" style:writing-mode="lr-tb"/>
      <style:text-properties fo:color="#ffffff" loext:opacity="100%" style:font-name="Montserrat Black" fo:font-weight="bold" style:font-weight-asian="bold" style:font-weight-complex="bold"/>
    </style:style>
    <style:style style:name="P18" style:family="paragraph">
      <style:paragraph-properties fo:margin-left="0.051cm" fo:margin-right="0.559cm" fo:margin-top="0cm" fo:margin-bottom="0cm" fo:line-height="100%" fo:text-align="center" fo:text-indent="-0.051cm"/>
      <style:text-properties fo:font-variant="normal" fo:text-transform="none" fo:color="#ffffff" loext:opacity="100%" style:text-outline="false" style:text-line-through-style="none" style:text-line-through-type="none" style:font-name="Montserrat Black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2ab21"/>
      <style:paragraph-properties fo:margin-left="0cm" fo:margin-right="0cm" fo:text-align="center" fo:text-indent="0cm" style:writing-mode="lr-tb"/>
      <style:text-properties fo:color="#ffffff" loext:opacity="100%" style:font-name="Montserrat Black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margin-top="0cm" fo:margin-bottom="0cm" fo:line-height="100%" fo:text-align="left" fo:text-indent="0.406cm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left" fo:text-indent="0.457cm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.508cm" fo:margin-right="0cm" fo:margin-top="0cm" fo:margin-bottom="0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.406cm" fo:margin-right="0cm" fo:margin-top="0cm" fo:margin-bottom="0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.406cm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50%" fo:text-align="justify" fo:text-indent="0.762cm"/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.762cm"/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32cm" fo:margin-bottom="0cm" fo:line-height="100%" fo:text-align="justify" fo:text-indent="0cm" style:text-autospace="none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justify" fo:text-indent="1.016cm" style:text-autospace="none"/>
      <style:text-properties fo:font-variant="normal" fo:text-transform="none" fo:color="#ffffff" loext:opacity="100%" style:text-outline="false" style:text-line-through-style="none" style:text-line-through-type="none" style:font-name="Montserrat Black" fo:font-size="12pt" fo:font-style="normal" fo:text-shadow="none" style:text-underline-style="none" fo:font-weight="normal" style:letter-kerning="true" style:font-name-asian="LiberationSerif-BoldItalic" style:font-size-asian="12pt" style:font-style-asian="normal" style:font-weight-asian="normal" style:font-name-complex="LiberationSerif-BoldItalic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1.93cm" fo:margin-right="0cm" fo:margin-top="0cm" fo:margin-bottom="0cm" fo:line-height="100%" fo:text-align="left" fo:text-indent="-1.422cm" style:text-autospace="none"/>
      <style:text-properties fo:font-variant="normal" fo:text-transform="none" fo:color="#ffffff" loext:opacity="100%" style:text-outline="false" style:text-line-through-style="none" style:text-line-through-type="none" style:font-name="Montserrat Black" fo:font-size="12pt" fo:font-style="normal" fo:text-shadow="none" style:text-underline-style="none" fo:font-weight="normal" style:letter-kerning="true" style:font-name-asian="LiberationSerif-BoldItalic" style:font-size-asian="12pt" style:font-style-asian="normal" style:font-weight-asian="normal" style:font-name-complex="LiberationSerif-BoldItalic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1.356cm" fo:margin-right="0cm" fo:margin-top="0cm" fo:margin-bottom="0cm" fo:line-height="100%" fo:text-align="left" fo:text-indent="-1cm" style:text-autospace="none"/>
      <style:text-properties fo:font-variant="normal" fo:text-transform="none" fo:color="#ffffff" loext:opacity="100%" style:text-outline="false" style:text-line-through-style="none" style:text-line-through-type="none" style:font-name="Montserrat Black" fo:font-size="12pt" fo:font-style="normal" fo:text-shadow="none" style:text-underline-style="none" fo:font-weight="normal" style:letter-kerning="true" style:font-name-asian="LiberationSerif-BoldItalic" style:font-size-asian="12pt" style:font-style-asian="normal" style:font-weight-asian="normal" style:font-name-complex="LiberationSerif-BoldItalic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.864cm" fo:margin-right="0cm" fo:margin-top="0cm" fo:margin-bottom="0cm" fo:line-height="100%" fo:text-align="justify" fo:text-indent="0cm" style:text-autospace="none"/>
      <style:text-properties fo:font-variant="normal" fo:text-transform="none" fo:color="#ffffff" loext:opacity="100%" style:text-outline="false" style:text-line-through-style="none" style:text-line-through-type="none" style:font-name="Montserrat Black" fo:font-size="12pt" fo:font-style="normal" fo:text-shadow="none" style:text-underline-style="none" fo:font-weight="normal" style:letter-kerning="true" style:font-name-asian="LiberationSerif-BoldItalic" style:font-size-asian="12pt" style:font-style-asian="normal" style:font-weight-asian="normal" style:font-name-complex="LiberationSerif-BoldItalic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.457cm" fo:margin-right="0cm" fo:margin-top="0cm" fo:margin-bottom="0cm" fo:line-height="100%" fo:text-align="left" fo:text-indent="0cm" style:text-autospace="none"/>
      <style:text-properties fo:font-variant="normal" fo:text-transform="none" fo:color="#ffffff" loext:opacity="100%" style:text-outline="false" style:text-line-through-style="none" style:text-line-through-type="none" style:font-name="Montserrat Black" fo:font-size="12pt" fo:font-style="normal" fo:text-shadow="none" style:text-underline-style="none" fo:font-weight="normal" style:letter-kerning="true" style:font-name-asian="LiberationSerif-BoldItalic" style:font-size-asian="12pt" style:font-style-asian="normal" style:font-weight-asian="normal" style:font-name-complex="LiberationSerif-BoldItalic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 draw:opacity="10%" draw:fill-image-width="100%" draw:fill-image-height="100%" style:repeat="no-repeat" draw:fill-image-ref-point="center"/>
      <style:paragraph-properties fo:margin-left="0cm" fo:margin-right="0cm" fo:margin-top="0.432cm" fo:margin-bottom="0cm" fo:line-height="100%" fo:text-align="justify" fo:text-indent="0cm" style:text-autospace="none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.457cm" fo:margin-right="0cm" fo:margin-top="0cm" fo:margin-bottom="0cm" fo:line-height="100%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letter-spacing="-0.053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.457cm" fo:margin-right="0cm" fo:margin-top="0cm" fo:margin-bottom="0cm" fo:line-height="100%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etter-spacing="-0.053cm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.457cm" fo:margin-right="0cm" fo:margin-top="0cm" fo:margin-bottom="0.508cm" fo:line-height="100%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letter-spacing="-0.053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left" fo:text-indent="0.457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letter-spacing="-0.053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.457cm" fo:margin-right="0cm" fo:margin-top="0cm" fo:margin-bottom="0cm" fo:line-height="100%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Montserrat Medium" fo:font-size="18pt" fo:letter-spacing="-0.053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3430c" loext:opacity="100%" style:text-outline="false" style:text-line-through-style="none" style:text-line-through-type="none" style:font-name="Montserrat Black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2ab21" loext:opacity="100%" style:text-outline="false" style:text-line-through-style="none" style:text-line-through-type="none" style:font-name="Montserrat Black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430c" loext:opacity="100%" style:text-outline="false" style:text-line-through-style="none" style:text-line-through-type="none" style:font-name="Montserrat Medium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2ab21" loext:opacity="100%" style:text-outline="false" style:text-line-through-style="none" style:text-line-through-type="none" style:font-name="Montserrat Black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Montserrat Black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Montserrat Black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T7" style:family="text">
      <style:text-properties fo:color="#ffffff" loext:opacity="100%" style:font-name="Montserrat Black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Montserrat Black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T9" style:family="text">
      <style:text-properties fo:color="#ffffff" loext:opacity="100%" style:font-name="Montserrat Black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6pt" fo:font-style="normal" fo:text-shadow="none" style:text-underline-style="none" fo:font-weight="bold" style:letter-kerning="true" style:font-name-asian="Montserrat Thin" style:font-size-asian="16pt" style:font-style-asian="normal" style:font-weight-asian="bold" style:font-name-complex="Montserrat Thin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4pt" fo:font-style="normal" fo:text-shadow="none" style:text-underline-style="none" fo:font-weight="bold" style:letter-kerning="true" style:font-name-asian="Montserrat Thin" style:font-size-asian="14pt" style:font-style-asian="normal" style:font-weight-asian="bold" style:font-name-complex="Montserrat Thin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Medium" fo:font-size="11pt" fo:font-style="normal" fo:text-shadow="none" style:text-underline-style="none" fo:font-weight="bold" style:letter-kerning="true" style:font-name-asian="Montserrat Thin" style:font-size-asian="11pt" style:font-style-asian="normal" style:font-weight-asian="bold" style:font-name-complex="Montserrat Thin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3pt" fo:font-style="normal" fo:text-shadow="none" style:text-underline-style="none" fo:font-weight="bold" style:letter-kerning="true" style:font-name-asian="Montserrat Thin" style:font-size-asian="13pt" style:font-style-asian="normal" style:font-weight-asian="bold" style:font-name-complex="Montserrat Thin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2pt" fo:font-style="normal" fo:text-shadow="none" style:text-underline-style="none" fo:font-weight="bold" style:letter-kerning="true" style:font-name-asian="Montserrat Thin" style:font-size-asian="12pt" style:font-style-asian="normal" style:font-weight-asian="bold" style:font-name-complex="Montserrat Thin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1pt" fo:font-style="normal" fo:text-shadow="none" style:text-underline-style="none" fo:font-weight="bold" style:letter-kerning="true" style:font-name-asian="Montserrat Thin" style:font-size-asian="11pt" style:font-style-asian="normal" style:font-weight-asian="bold" style:font-name-complex="Montserrat Thin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1pt" fo:font-style="normal" fo:text-shadow="none" style:text-underline-style="none" fo:font-weight="bold" style:letter-kerning="true" style:font-size-asian="11pt" style:font-style-asian="normal" style:font-weight-asian="bold" style:font-size-complex="1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2ab21" loext:opacity="100%" style:text-outline="false" style:text-line-through-style="none" style:text-line-through-type="none" style:font-name="Montserrat Light" fo:font-size="11pt" fo:font-style="italic" fo:text-shadow="none" style:text-underline-style="none" fo:font-weight="bold" style:letter-kerning="true" style:font-size-asian="11pt" style:font-style-asian="italic" style:font-weight-asian="bold" style:font-size-complex="11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1pt" fo:font-style="italic" fo:text-shadow="none" style:text-underline-style="none" fo:font-weight="normal" style:letter-kerning="true" style:font-size-asian="11pt" style:font-style-asian="italic" style:font-weight-asian="norm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Light" fo:font-size="11pt" fo:font-style="normal" fo:text-shadow="none" style:text-underline-style="none" fo:font-weight="normal" style:letter-kerning="true" style:font-name-asian="Georgia1" style:font-size-asian="11pt" style:font-style-asian="normal" style:font-weight-asian="normal" style:font-name-complex="Georgi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tserrat Light" fo:font-size="11pt" style:font-size-asian="11pt" style:font-size-complex="11pt"/>
    </style:style>
    <style:style style:name="T25" style:family="text">
      <style:text-properties fo:color="#f2ab21" loext:opacity="100%" style:font-name="Montserrat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ffffff" loext:opacity="100%" style:font-name="Montserrat Black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color="#ffffff" loext:opacity="100%" style:font-name="Montserrat Thi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ffffff" loext:opacity="100%" style:font-name="Montserrat Thin" fo:font-size="11pt" fo:font-style="normal" fo:font-weight="normal" style:font-name-asian="Montserrat Black2" style:font-size-asian="11pt" style:font-style-asian="normal" style:font-weight-asian="normal" style:font-name-complex="Montserrat Black2" style:font-size-complex="11pt" style:font-style-complex="normal" style:font-weight-complex="normal"/>
    </style:style>
    <style:style style:name="T29" style:family="text">
      <style:text-properties fo:color="#ffffff" loext:opacity="100%" style:font-name="Montserrat Black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f2ab21" loext:opacity="100%" style:font-name="Montserrat Black" fo:font-size="11pt" fo:font-style="normal" fo:font-weight="normal" style:font-name-asian="Montserrat Black2" style:font-size-asian="11pt" style:font-style-asian="normal" style:font-weight-asian="normal" style:font-name-complex="Montserrat Black2" style:font-size-complex="11pt" style:font-style-complex="normal" style:font-weight-complex="normal"/>
    </style:style>
    <style:style style:name="T31" style:family="text">
      <style:text-properties fo:color="#ffffff" loext:opacity="100%" style:font-name="Montserrat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Montserrat Black" fo:font-size="11pt" fo:letter-spacing="normal" fo:font-style="normal" fo:text-shadow="none" style:text-underline-style="none" fo:font-weight="bold" style:letter-kerning="true" style:font-name-asian="LiberationSerif-BoldItalic" style:font-size-asian="11pt" style:font-style-asian="normal" style:font-weight-asian="bold" style:font-name-complex="LiberationSerif-BoldItalic" style:font-size-complex="11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Montserrat Light" fo:font-size="11pt" fo:letter-spacing="normal" fo:font-style="normal" fo:text-shadow="none" style:text-underline-style="none" fo:font-weight="bold" style:letter-kerning="true" style:font-name-asian="LiberationSerif" style:font-size-asian="11pt" style:font-style-asian="normal" style:font-weight-asian="bold" style:font-name-complex="LiberationSerif" style:font-size-complex="11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1pt" fo:letter-spacing="normal" fo:font-style="normal" fo:text-shadow="none" style:text-underline-style="none" fo:font-weight="bold" style:letter-kerning="true" style:font-name-asian="LiberationSerif-BoldItalic" style:font-size-asian="11pt" style:font-style-asian="normal" style:font-weight-asian="bold" style:font-name-complex="LiberationSerif-BoldItalic" style:font-size-complex="1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Medium" fo:font-size="16pt" fo:letter-spacing="normal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1pt" fo:letter-spacing="normal" fo:font-style="normal" fo:text-shadow="none" style:text-underline-style="none" fo:font-weight="normal" style:letter-kerning="true" style:font-name-asian="LiberationSerif" style:font-size-asian="11pt" style:font-style-asian="normal" style:font-weight-asian="normal" style:font-name-complex="Liberation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1pt" fo:letter-spacing="normal" fo:font-style="normal" fo:text-shadow="none" style:text-underline-style="none" fo:font-weight="bold" style:letter-kerning="true" style:font-name-asian="LiberationSerif" style:font-size-asian="11pt" style:font-style-asian="normal" style:font-weight-asian="bold" style:font-name-complex="LiberationSerif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Montserrat Black" fo:font-size="12pt" fo:letter-spacing="normal" fo:font-style="normal" fo:text-shadow="none" style:text-underline-style="none" fo:font-weight="normal" style:letter-kerning="true" style:font-name-asian="LiberationSerif" style:font-size-asian="12pt" style:font-style-asian="normal" style:font-weight-asian="normal" style:font-name-complex="LiberationSerif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Montserrat Black" fo:font-size="12pt" fo:letter-spacing="normal" fo:font-style="normal" fo:text-shadow="none" style:text-underline-style="none" fo:font-weight="normal" style:letter-kerning="true" style:font-name-asian="Montserrat Medium1" style:font-size-asian="12pt" style:font-style-asian="normal" style:font-weight-asian="normal" style:font-name-complex="Montserrat Medium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Montserrat Light" fo:font-size="12pt" fo:letter-spacing="normal" fo:font-style="normal" fo:text-shadow="none" style:text-underline-style="none" fo:font-weight="bold" style:letter-kerning="true" style:font-name-asian="LiberationSerif" style:font-size-asian="12pt" style:font-style-asian="normal" style:font-weight-asian="bold" style:font-name-complex="LiberationSerif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Montserrat Light" fo:font-size="11pt" fo:letter-spacing="normal" fo:font-style="normal" fo:text-shadow="none" style:text-underline-style="none" fo:font-weight="bold" style:letter-kerning="true" style:font-name-asian="LiberationSerif-BoldItalic" style:font-size-asian="11pt" style:font-style-asian="normal" style:font-weight-asian="bold" style:font-name-complex="LiberationSerif-BoldItalic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6pt" fo:letter-spacing="normal" fo:font-style="normal" fo:text-shadow="none" style:text-underline-style="none" fo:font-weight="bold" style:letter-kerning="true" style:font-name-asian="Montserrat Thin" style:font-size-asian="16pt" style:font-style-asian="normal" style:font-weight-asian="bold" style:font-name-complex="Montserrat Thin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Light" fo:font-size="11pt" fo:letter-spacing="normal" fo:font-style="normal" fo:text-shadow="none" style:text-underline-style="none" fo:font-weight="bold" style:letter-kerning="true" style:font-name-asian="Montserrat Thin" style:font-size-asian="11pt" style:font-style-asian="normal" style:font-weight-asian="bold" style:font-name-complex="Montserrat Thin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Montserrat Medium" fo:font-size="16pt" fo:letter-spacing="normal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Montserrat Light" fo:font-size="11pt" fo:letter-spacing="normal" fo:font-style="normal" fo:text-shadow="none" style:text-underline-style="none" fo:font-weight="normal" style:letter-kerning="true" style:font-name-asian="LiberationSerif" style:font-size-asian="11pt" style:font-style-asian="normal" style:font-weight-asian="normal" style:font-name-complex="LiberationSerif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12cm" svg:height="29.686cm" svg:x="0cm" svg:y="0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05cm" svg:height="3.997cm" svg:x="1.094cm" svg:y="-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.096cm" svg:x="1.1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1cm" svg:height="3.997cm" svg:x="1.34cm" svg:y="-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96cm" svg:height="5.496cm" svg:x="1.403cm" svg:y="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9cm" svg:height="29.712cm" svg:x="20.721cm" svg:y="-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25cm" svg:height="2.697cm" svg:x="9.484cm" svg:y="1.473cm">
          <text:p text:style-name="P6"><text:span text:style-name="T1">ABDUL DANIEL </text:span><text:span text:style-name="T2">TRATO</text:span></text:p>
          <text:p text:style-name="P7"><text:span text:style-name="T3">Gestor de Logística</text:span></text:p>
          <text:p text:style-name="P6"><text:span text:style-name="T4">Oficial Sêni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9" draw:layer="layout" svg:width="0.097cm" svg:height="27.982cm" svg:x="8.882cm" svg:y="1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5" draw:layer="layout" svg:width="0.691cm" svg:height="0.7cm" svg:x="14.095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5.585cm" svg:height="0.708cm" svg:x="8.834cm" svg:y="4.818cm">
          <text:p text:style-name="P10"><text:span text:style-name="T5">Sobre Mi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6.195cm" svg:height="0.697cm" svg:x="8.834cm" svg:y="9.218cm">
          <text:p text:style-name="P12"><text:span text:style-name="T5">Experi</text:span><text:span text:style-name="T6">ê</text:span><text:span text:style-name="T5">nc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013cm" svg:height="0.697cm" svg:x="8.879cm" svg:y="18.929cm">
          <text:p text:style-name="P10"><text:span text:style-name="T5">Habilida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95cm" svg:height="0.697cm" svg:x="14.6cm" svg:y="1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72cm" svg:height="0.689cm" svg:x="14.654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4.477cm" svg:height="0.701cm" svg:x="0.002cm" svg:y="22.729cm">
          <text:p text:style-name="P14"><text:span text:style-name="T7">Educação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498cm" svg:height="0.712cm" svg:x="0.002cm" svg:y="11.796cm">
          <text:p text:style-name="P16"><text:span text:style-name="T7">Refer</text:span><text:span text:style-name="T8">ê</text:span><text:span text:style-name="T7">ncias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694cm" svg:height="0.697cm" svg:x="0cm" svg:y="7.816cm">
          <text:p text:style-name="P18"><text:span text:style-name="T9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0.668cm" svg:height="0.697cm" svg:x="4.314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76cm" svg:height="0.727cm" svg:x="5.106cm" svg:y="11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708cm" svg:height="0.701cm" svg:x="4.182cm" svg:y="2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493cm" svg:height="0.493cm" svg:x="8.6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4" draw:layer="layout" svg:width="8.25cm" svg:height="3.342cm" svg:x="-0.016cm" svg:y="8.52cm">
          <draw:text-box>
            <text:p text:style-name="P20"><text:span text:style-name="T10">✆ </text:span><text:span text:style-name="T11">+258-84-777-8476</text:span></text:p>
            <text:p text:style-name="P21"><text:span text:style-name="T12">✉</text:span><text:span text:style-name="T13"> </text:span><text:span text:style-name="T14">abdultrato@gmail.com</text:span></text:p>
            <text:p text:style-name="P22"><text:span text:style-name="T15">🔗</text:span><text:span text:style-name="T16"> </text:span><text:span text:style-name="T17"><text:a xlink:href="https://www.linkedin.com/" xlink:type="simple">https://www.linkedin.com/</text:a></text:span><text:span text:style-name="T17">abdul</text:span><text:span text:style-name="T11">-daniel-trato</text:span></text:p>
            <text:p text:style-name="P23"><text:span text:style-name="T15">🏠</text:span><text:span text:style-name="T12"> </text:span><text:span text:style-name="T17">Cidade de Pemba, Cabo Delgado</text:span></text:p>
          </draw:text-box>
        </draw:frame>
        <draw:frame draw:style-name="gr23" draw:text-style-name="P26" draw:layer="layout" svg:width="11.5cm" svg:height="3.806cm" svg:x="9.066cm" svg:y="5.357cm">
          <draw:text-box>
            <text:p text:style-name="P25"><text:span text:style-name="T18">Sou um profissional</text:span><text:span text:style-name="T19"> formado em </text:span><text:span text:style-name="T20">CV-5 em</text:span><text:span text:style-name="T19"> </text:span><text:span text:style-name="T21">Gestão da Logística</text:span><text:span text:style-name="T19"> pelo </text:span><text:span text:style-name="T22">Instituto Industrial e Comercial de <text:s/>Pemba</text:span><text:span text:style-name="T19">, com uma sólida base prática e experi</text:span><text:span text:style-name="T23">ê</text:span><text:span text:style-name="T18">ncia adquirida durante <text:s/>9 anos como Técnico de Laboratório <text:s text:c="2"/>e 5 anos como Gestor de Logística</text:span><text:span text:style-name="T24">.</text:span></text:p>
          </draw:text-box>
        </draw:frame>
        <draw:frame draw:style-name="gr24" draw:text-style-name="P33" draw:layer="layout" svg:width="8.177cm" svg:height="4.95cm" svg:x="0cm" svg:y="23.47cm">
          <draw:text-box>
            <text:p text:style-name="P27"><text:span text:style-name="T25"><text:s/></text:span><text:span text:style-name="T26"><text:s/>🎓</text:span><text:span text:style-name="T25">CV5 – Gestão da Logística</text:span></text:p>
            <text:p text:style-name="P28"><text:span text:style-name="T27">Janeiro 2022 </text:span><text:span text:style-name="T28">á</text:span><text:span text:style-name="T27"> Dezembro 2024</text:span></text:p>
            <text:p text:style-name="P29"><text:span text:style-name="T29">Instituto Industrial e Comercial de Pemba</text:span></text:p>
            <text:p text:style-name="P30"><text:span text:style-name="T26">🎓</text:span><text:span text:style-name="T25">Curso Médio de T</text:span><text:span text:style-name="T30">é</text:span><text:span text:style-name="T25">cnicos de Laboratório</text:span></text:p>
            <text:p text:style-name="P31"><text:span text:style-name="T27">Fevereiro 2017 </text:span><text:span text:style-name="T28">á</text:span><text:span text:style-name="T27"> Dezembro 2018</text:span><text:span text:style-name="T31"> </text:span></text:p>
            <text:p text:style-name="P32"><text:span text:style-name="T29">Instituto de Ciências de Saúde de Nampula</text:span></text:p>
          </draw:text-box>
        </draw:frame>
        <draw:custom-shape draw:style-name="gr21" draw:text-style-name="P3" draw:layer="layout" svg:width="0.493cm" svg:height="0.493cm" svg:x="8.691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29.68cm" svg:x="8.234cm" svg:y="0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" draw:layer="layout" svg:width="0.493cm" svg:height="0.493cm" svg:x="8.691cm" svg:y="2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493cm" svg:height="0.493cm" svg:x="8.691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493cm" svg:height="0.493cm" svg:x="8.691cm" svg:y="12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493cm" svg:height="0.493cm" svg:x="8.691cm" svg:y="2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7.978cm" svg:height="9.995cm" svg:x="0cm" svg:y="12.62cm">
          <draw:text-box>
            <text:p text:style-name="P34"><text:span text:style-name="T32">PhD. Ezequias Zefanias Sitoe</text:span></text:p>
            <text:p text:style-name="P34"><text:span text:style-name="T33">✧ </text:span><text:span text:style-name="T34">Supervisor Provincial de Laboratório de Nampula</text:span></text:p>
            <text:p text:style-name="P35"><text:span text:style-name="T35">✆</text:span><text:span text:style-name="T36">+258-84-734-1038</text:span></text:p>
            <text:p text:style-name="P36"><text:span text:style-name="T33">✧ </text:span><text:span text:style-name="T37">Hospital Central de Nampula</text:span></text:p>
            <text:p text:style-name="P34"><text:span text:style-name="T38">Eng</text:span><text:span text:style-name="T39">ª</text:span><text:span text:style-name="T32">. Sandra Nascimento</text:span></text:p>
            <text:p text:style-name="P34"><text:span text:style-name="T33">✧ </text:span><text:span text:style-name="T40">Diretora</text:span><text:span text:style-name="T41"> Geral – CLIDIS</text:span></text:p>
            <text:p text:style-name="P37"><text:span text:style-name="T42">✉</text:span><text:span text:style-name="T43">sandra.nascimento@clidis.co.mz</text:span></text:p>
            <text:p text:style-name="P35"><text:span text:style-name="T44">✆</text:span><text:span text:style-name="T45">+258-84-734-1038</text:span></text:p>
            <text:p text:style-name="P35"><text:span text:style-name="T33">✧</text:span><text:span text:style-name="T45"> </text:span><text:span text:style-name="T33">Clínica de Diagnósticos e Saúde <text:s text:c="2"/>✧ Cidade de Pemba</text:span></text:p>
            <text:p text:style-name="P35"><text:span text:style-name="T33"/></text:p>
            <text:p text:style-name="P35"><text:span text:style-name="T32">Dr. José João Tivane</text:span></text:p>
            <text:p text:style-name="P35"><text:span text:style-name="T33">✧ Responsável de </text:span><text:span text:style-name="T41">Microbiologia</text:span></text:p>
            <text:p text:style-name="P35"><text:span text:style-name="T44">✆</text:span><text:span text:style-name="T45">+258-84-513-0055</text:span></text:p>
            <text:p text:style-name="P35"><text:span text:style-name="T44">✆</text:span><text:span text:style-name="T45">+258-86-028-8737</text:span></text:p>
            <text:p text:style-name="P35"><text:span text:style-name="T33">✧ Hospital Provincial de Pemb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iberationSerif-Bold" svg:font-family="LiberationSerif-Bold"/>
    <style:font-face style:name="LiberationSerif-BoldItalic" svg:font-family="LiberationSerif-BoldItalic"/>
    <style:font-face style:name="Microsoft YaHei" svg:font-family="'Microsoft YaHei'" style:font-family-generic="system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Black2" svg:font-family="'Montserrat Black'"/>
    <style:font-face style:name="Montserrat Light" svg:font-family="'Montserrat Light'" style:font-pitch="variable"/>
    <style:font-face style:name="Montserrat Medium" svg:font-family="'Montserrat Medium'" style:font-adornments="Regular" style:font-pitch="variable"/>
    <style:font-face style:name="Montserrat Medium1" svg:font-family="'Montserrat Medium'"/>
    <style:font-face style:name="Montserrat Thin" svg:font-family="'Montserrat Thin'" style:font-pitch="variable"/>
    <style:font-face style:name="Montserrat Thin1" svg:font-family="'Montserrat Thin'" style:font-adornments="Mediu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hotoy" xlink:href="Pictures/10000001000004A6000004C68309F0C4.png" xlink:type="simple" xlink:show="embed" xlink:actuate="onLoad"/>
    <draw:marker draw:name="Arrow" svg:viewBox="0 0 20 30" svg:d="M10 0l-10 30h20z"/>
    <draw:marker draw:name="Arrowheads_20_1" draw:display-name="Arrowheads 1" svg:viewBox="0 0 10 10" svg:d="M0 0h10v10h-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cm" fo:margin-bottom="0cm" fo:margin-left="0.311cm" fo:margin-right="0.2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8T09:54:11.911964200</meta:creation-date>
    <dc:date>2026-05-23T03:03:13.711410500</dc:date>
    <meta:editing-duration>PT8H26M42S</meta:editing-duration>
    <meta:editing-cycles>86</meta:editing-cycles>
    <meta:generator>LibreOffice/26.2.3.2$Windows_X86_64 LibreOffice_project/70e089b17412e4cb7773e41413306b17a2328c34</meta:generator>
    <meta:document-statistic meta:object-count="31"/>
  </office:meta>
</office:document-meta>
</file>